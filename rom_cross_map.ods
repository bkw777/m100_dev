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3"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RST 4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3"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2"/>
          <table:table-cell office:value-type="string" calcext:value-type="string">
            <text:p>F73F</text:p>
          </table:table-cell>
          <table:table-cell table:number-columns-repeated="2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2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2"/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2"/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2"/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2"/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4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2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6:02:20.032196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0T16:29:57.227585043</dc:date>
    <meta:editing-duration>PT12H3M34S</meta:editing-duration>
    <meta:editing-cycles>16</meta:editing-cycles>
    <meta:generator>LibreOffice/24.2.7.2$Linux_X86_64 LibreOffice_project/420$Build-2</meta:generator>
    <meta:document-statistic meta:table-count="1" meta:cell-count="2319" meta:object-count="0"/>
  </office:meta>
</office:document-meta>
</file>