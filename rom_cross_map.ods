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5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2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5" table:default-cell-style-name="Default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5" office:value-type="string" calcext:value-type="string">
            <text:p>M10na</text:p>
          </table:table-cell>
          <table:table-cell table:style-name="ce5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style-name="ce12" table:number-columns-repeated="16375"/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1F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5"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5"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5"/>
          <table:table-cell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5"/>
          <table:table-cell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5"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/>
          <table:table-cell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6"/>
          <table:table-cell office:value-type="string" calcext:value-type="string">
            <text:p>RST_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6"/>
          <table:table-cell office:value-type="string" calcext:value-type="string">
            <text:p>PRT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/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5"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string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5"/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r f-key tb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5"/>
          <table:table-cell office:value-type="string" calcext:value-type="string">
            <text:p>57E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get file a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file ads + 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5"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6"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GETEOF</text:p>
          </table:table-cell>
          <table:table-cell office:value-type="string" calcext:value-type="string">
            <text:p>search for EOF (0x1A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/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5"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6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5"/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5"/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5"/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/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/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nd w x-on-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5"/>
          <table:table-cell office:value-type="string" calcext:value-type="string">
            <text:p>6B42</text:p>
          </table:table-cell>
          <table:table-cell/>
          <table:table-cell office:value-type="string" calcext:value-type="string">
            <text:p>send character in C to serial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5"/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5"/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/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5"/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 and sync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5"/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5"/>
          <table:table-cell office:value-type="string" calcext:value-type="string">
            <text:p>70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5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3"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5"/>
          <table:table-cell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5"/>
          <table:table-cell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5"/>
          <table:table-cell office:value-type="string" calcext:value-type="string">
            <text:p>F6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tra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5"/>
          <table:table-cell office:value-type="string" calcext:value-type="string">
            <text:p>F662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mm sta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5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5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Bfr for kb li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5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5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5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5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FAD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5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5"/>
          <table:table-cell office:value-type="string" calcext:value-type="string">
            <text:p>FB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5"/>
          <table:table-cell office:value-type="string" calcext:value-type="string">
            <text:p>FB7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STDO</text:p>
          </table:table-cell>
          <table:table-cell office:value-type="string" calcext:value-type="string">
            <text:p>strt DO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STCO</text:p>
          </table:table-cell>
          <table:table-cell office:value-type="string" calcext:value-type="string">
            <text:p>strt CO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5"/>
          <table:table-cell office:value-type="string" calcext:value-type="string">
            <text:p>FBC4</text:p>
          </table:table-cell>
          <table:table-cell office:value-type="string" calcext:value-type="string">
            <text:p>TOPFIL</text:p>
          </table:table-cell>
          <table:table-cell office:value-type="string" calcext:value-type="string">
            <text:p>end of top fil / DVI start of variable dat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5"/>
          <table:table-cell office:value-type="string" calcext:value-type="string">
            <text:p>FB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rt arr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5"/>
          <table:table-cell office:value-type="string" calcext:value-type="string">
            <text:p>FBC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1st unusd byte - unused memory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5"/>
          <table:table-cell office:value-type="string" calcext:value-type="string">
            <text:p>FC9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5"/>
          <table:table-cell office:value-type="string" calcext:value-type="string">
            <text:p>FCA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5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5"/>
          <table:table-cell office:value-type="string" calcext:value-type="string">
            <text:p>FCA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5"/>
          <table:table-cell office:value-type="string" calcext:value-type="string">
            <text:p>FC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E00</text:p>
          </table:table-cell>
          <table:table-cell table:number-columns-repeated="6"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5"/>
          <table:table-cell office:value-type="string" calcext:value-type="string">
            <text:p>FCE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5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5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5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5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5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5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5"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5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5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5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5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5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5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5"/>
        </table:table-row>
        <table:table-row table:style-name="ro2" table:number-rows-repeated="10481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rom_map_100_k85.A1:rom_map_100_k85.I46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33:06.872300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9T18:52:40.825523386</dc:date>
    <meta:editing-duration>PT11H11M11S</meta:editing-duration>
    <meta:editing-cycles>8</meta:editing-cycles>
    <meta:generator>LibreOffice/24.2.7.2$Linux_X86_64 LibreOffice_project/420$Build-2</meta:generator>
    <meta:document-statistic meta:table-count="1" meta:cell-count="1423" meta:object-count="0"/>
  </office:meta>
</office:document-meta>
</file>