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50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2"/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2"/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CF6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2"/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2"/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3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21:55:06.375620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1T00:19:30.753801390</dc:date>
    <meta:editing-duration>PT12H34M47S</meta:editing-duration>
    <meta:editing-cycles>19</meta:editing-cycles>
    <meta:generator>LibreOffice/24.2.7.2$Linux_X86_64 LibreOffice_project/420$Build-2</meta:generator>
    <meta:document-statistic meta:table-count="1" meta:cell-count="2420" meta:object-count="0"/>
  </office:meta>
</office:document-meta>
</file>