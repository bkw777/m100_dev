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, auto type</text:p>
          </table:table-cell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, type A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/>
          <table:table-cell office:value-type="string" calcext:value-type="string">
            <text:p>4C1A</text:p>
          </table:table-cell>
          <table:table-cell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/>
          <table:table-cell office:value-type="string" calcext:value-type="string">
            <text:p>5ACE</text:p>
          </table:table-cell>
          <table:table-cell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3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5:41:33.382311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1T16:51:09.279859256</dc:date>
    <meta:editing-duration>PT13H2M41S</meta:editing-duration>
    <meta:editing-cycles>21</meta:editing-cycles>
    <meta:generator>LibreOffice/24.2.7.2$Linux_X86_64 LibreOffice_project/420$Build-2</meta:generator>
    <meta:document-statistic meta:table-count="1" meta:cell-count="2457" meta:object-count="0"/>
  </office:meta>
</office:document-meta>
</file>