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1.8047in"/>
    </style:style>
    <style:style style:name="co7" style:family="table-column">
      <style:table-column-properties fo:break-before="auto" style:column-width="6.45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5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2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6376" table:default-cell-style-name="Default"/>
        <table:table-row table:style-name="ro1">
          <table:table-cell table:style-name="ce7" office:value-type="string" calcext:value-type="string">
            <text:p>10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NEC</text:p>
          </table:table-cell>
          <table:table-cell table:style-name="ce5" office:value-type="string" calcext:value-type="string">
            <text:p>M10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style-name="ce12" table:number-columns-repeated="16376"/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3"/>
          <table:table-cell office:value-type="string" calcext:value-type="string">
            <text:p>03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3"/>
          <table:table-cell office:value-type="string" calcext:value-type="string">
            <text:p>0464</text:p>
          </table:table-cell>
          <table:table-cell/>
          <table:table-cell office:value-type="string" calcext:value-type="string">
            <text:p>generate error in 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3"/>
          <table:table-cell office:value-type="string" calcext:value-type="string">
            <text:p>05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3"/>
          <table:table-cell office:value-type="string" calcext:value-type="string">
            <text:p>05F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3"/>
          <table:table-cell office:value-type="string" calcext:value-type="string">
            <text:p>072D</text:p>
          </table:table-cell>
          <table:table-cell office:value-type="string" calcext:value-type="string">
            <text:p>F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3"/>
          <table:table-cell office:value-type="string" calcext:value-type="string">
            <text:p>080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3"/>
          <table:table-cell office:value-type="string" calcext:value-type="string">
            <text:p>0879</text:p>
          </table:table-cell>
          <table:table-cell office:value-type="string" calcext:value-type="string">
            <text:p>D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3"/>
          <table:table-cell office:value-type="string" calcext:value-type="string">
            <text:p>08E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3"/>
          <table:table-cell office:value-type="string" calcext:value-type="string">
            <text:p>08F2</text:p>
          </table:table-cell>
          <table:table-cell/>
          <table:table-cell office:value-type="string" calcext:value-type="string">
            <text:p>convert ascii at M to bina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3"/>
          <table:table-cell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3"/>
          <table:table-cell office:value-type="string" calcext:value-type="string">
            <text:p>096D</text:p>
          </table:table-cell>
          <table:table-cell office:value-type="string" calcext:value-type="string">
            <text:p>RE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3"/>
          <table:table-cell office:value-type="string" calcext:value-type="string">
            <text:p>09A5</text:p>
          </table:table-cell>
          <table:table-cell office:value-type="string" calcext:value-type="string">
            <text:p>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3"/>
          <table:table-cell office:value-type="string" calcext:value-type="string">
            <text:p>09A7</text:p>
          </table:table-cell>
          <table:table-cell office:value-type="string" calcext:value-type="string">
            <text:p>R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3"/>
          <table:table-cell office:value-type="string" calcext:value-type="string">
            <text:p>09CA</text:p>
          </table:table-cell>
          <table:table-cell office:value-type="string" calcext:value-type="string">
            <text:p>L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3"/>
          <table:table-cell office:value-type="string" calcext:value-type="string">
            <text:p>0916</text:p>
          </table:table-cell>
          <table:table-cell office:value-type="string" calcext:value-type="string">
            <text:p>RU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3"/>
          <table:table-cell office:value-type="string" calcext:value-type="string">
            <text:p>0919</text:p>
          </table:table-cell>
          <table:table-cell office:value-type="string" calcext:value-type="string">
            <text:p>RUN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3"/>
          <table:table-cell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3"/>
          <table:table-cell office:value-type="string" calcext:value-type="string">
            <text:p>093C</text:p>
          </table:table-cell>
          <table:table-cell office:value-type="string" calcext:value-type="string">
            <text:p>RUN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3"/>
          <table:table-cell office:value-type="string" calcext:value-type="string">
            <text:p>0A36</text:p>
          </table:table-cell>
          <table:table-cell office:value-type="string" calcext:value-type="string">
            <text:p>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3"/>
          <table:table-cell office:value-type="string" calcext:value-type="string">
            <text:p>0AB7</text:p>
          </table:table-cell>
          <table:table-cell office:value-type="string" calcext:value-type="string">
            <text:p>RESU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3"/>
          <table:table-cell office:value-type="string" calcext:value-type="string">
            <text:p>0B16</text:p>
          </table:table-cell>
          <table:table-cell office:value-type="string" calcext:value-type="string">
            <text:p>ERR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3"/>
          <table:table-cell office:value-type="string" calcext:value-type="string">
            <text:p>0B21</text:p>
          </table:table-cell>
          <table:table-cell office:value-type="string" calcext:value-type="string">
            <text:p>I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3"/>
          <table:table-cell office:value-type="string" calcext:value-type="string">
            <text:p>0B55</text:p>
          </table:table-cell>
          <table:table-cell office:value-type="string" calcext:value-type="string">
            <text:p>L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3"/>
          <table:table-cell office:value-type="string" calcext:value-type="string">
            <text:p>0B5D</text:p>
          </table:table-cell>
          <table:table-cell office:value-type="string" calcext:value-type="string">
            <text:p>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3"/>
          <table:table-cell office:value-type="string" calcext:value-type="string">
            <text:p>0C4C</text:p>
          </table:table-cell>
          <table:table-cell office:value-type="string" calcext:value-type="string">
            <text:p>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3"/>
          <table:table-cell office:value-type="string" calcext:value-type="string">
            <text:p>0CAA</text:p>
          </table:table-cell>
          <table:table-cell office:value-type="string" calcext:value-type="string">
            <text:p>INP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3"/>
          <table:table-cell office:value-type="string" calcext:value-type="string">
            <text:p>0CE0</text:p>
          </table:table-cell>
          <table:table-cell office:value-type="string" calcext:value-type="string">
            <text:p>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3"/>
          <table:table-cell office:value-type="string" calcext:value-type="string">
            <text:p>0D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3"/>
          <table:table-cell office:value-type="string" calcext:value-type="string">
            <text:p>0D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3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3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3"/>
          <table:table-cell office:value-type="string" calcext:value-type="string">
            <text:p>10D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3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3"/>
          <table:table-cell office:value-type="string" calcext:value-type="string">
            <text:p>11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3"/>
          <table:table-cell office:value-type="string" calcext:value-type="string">
            <text:p>11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3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3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2"/>
          <table:table-cell office:value-type="string" calcext:value-type="string">
            <text:p>11A5</text:p>
          </table:table-cell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3"/>
          <table:table-cell office:value-type="string" calcext:value-type="string">
            <text:p>11B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3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3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3"/>
          <table:table-cell office:value-type="string" calcext:value-type="string">
            <text:p>14F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3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3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3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3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3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3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3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3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3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2"/>
          <table:table-cell office:value-type="string" calcext:value-type="string">
            <text:p>17F0</text:p>
          </table:table-cell>
          <table:table-cell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3"/>
          <table:table-cell office:value-type="string" calcext:value-type="string">
            <text:p>17F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3"/>
          <table:table-cell office:value-type="string" calcext:value-type="string">
            <text:p>180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3"/>
          <table:table-cell office:value-type="string" calcext:value-type="string">
            <text:p>18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3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3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3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3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3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3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3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3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4"/>
          <table:table-cell office:value-type="string" calcext:value-type="string">
            <text:p>CSRL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3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3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3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3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3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3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3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1F0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3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3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3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2"/>
          <table:table-cell office:value-type="string" calcext:value-type="string">
            <text:p>20C1</text:p>
          </table:table-cell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2"/>
          <table:table-cell office:value-type="string" calcext:value-type="string">
            <text:p>20C1</text:p>
          </table:table-cell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3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3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3"/>
          <table:table-cell office:value-type="string" calcext:value-type="string">
            <text:p>21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2157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215A</text:p>
          </table:table-cell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3"/>
          <table:table-cell office:value-type="string" calcext:value-type="string">
            <text:p>216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2"/>
          <table:table-cell office:value-type="string" calcext:value-type="string">
            <text:p>21B3</text:p>
          </table:table-cell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2"/>
          <table:table-cell office:value-type="string" calcext:value-type="string">
            <text:p>21B6</text:p>
          </table:table-cell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2"/>
          <table:table-cell office:value-type="string" calcext:value-type="string">
            <text:p>2252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3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3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3"/>
          <table:table-cell office:value-type="string" calcext:value-type="string">
            <text:p>235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3"/>
          <table:table-cell office:value-type="string" calcext:value-type="string">
            <text:p>246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3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3"/>
          <table:table-cell office:value-type="string" calcext:value-type="string">
            <text:p>27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3"/>
          <table:table-cell office:value-type="string" calcext:value-type="string">
            <text:p>27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3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3"/>
          <table:table-cell office:value-type="string" calcext:value-type="string">
            <text:p>27A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3"/>
          <table:table-cell office:value-type="string" calcext:value-type="string">
            <text:p>27B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3"/>
          <table:table-cell office:value-type="string" calcext:value-type="string">
            <text:p>27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3"/>
          <table:table-cell office:value-type="string" calcext:value-type="string">
            <text:p>27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3"/>
          <table:table-cell office:value-type="string" calcext:value-type="string">
            <text:p>27D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3"/>
          <table:table-cell office:value-type="string" calcext:value-type="string">
            <text:p>27F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3"/>
          <table:table-cell office:value-type="string" calcext:value-type="string">
            <text:p>280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3"/>
          <table:table-cell office:value-type="string" calcext:value-type="string">
            <text:p>28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3"/>
          <table:table-cell office:value-type="string" calcext:value-type="string">
            <text:p>28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3"/>
          <table:table-cell office:value-type="string" calcext:value-type="string">
            <text:p>28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3"/>
          <table:table-cell office:value-type="string" calcext:value-type="string">
            <text:p>285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3"/>
          <table:table-cell office:value-type="string" calcext:value-type="string">
            <text:p>280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3"/>
          <table:table-cell office:value-type="string" calcext:value-type="string">
            <text:p>28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3"/>
          <table:table-cell office:value-type="string" calcext:value-type="string">
            <text:p>288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28D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3"/>
          <table:table-cell office:value-type="string" calcext:value-type="string">
            <text:p>28E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3"/>
          <table:table-cell office:value-type="string" calcext:value-type="string">
            <text:p>28E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3"/>
          <table:table-cell office:value-type="string" calcext:value-type="string">
            <text:p>28F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3"/>
          <table:table-cell office:value-type="string" calcext:value-type="string">
            <text:p>28F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3"/>
          <table:table-cell office:value-type="string" calcext:value-type="string">
            <text:p>290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3"/>
          <table:table-cell office:value-type="string" calcext:value-type="string">
            <text:p>290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3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3"/>
          <table:table-cell office:value-type="string" calcext:value-type="string">
            <text:p>29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3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3"/>
          <table:table-cell office:value-type="string" calcext:value-type="string">
            <text:p>29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3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3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3"/>
          <table:table-cell office:value-type="string" calcext:value-type="string">
            <text:p>296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3"/>
          <table:table-cell office:value-type="string" calcext:value-type="string">
            <text:p>296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3"/>
          <table:table-cell office:value-type="string" calcext:value-type="string">
            <text:p>296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3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3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2"/>
          <table:table-cell office:value-type="string" calcext:value-type="string">
            <text:p>3483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3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3"/>
          <table:table-cell office:value-type="string" calcext:value-type="string">
            <text:p>35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3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3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3"/>
          <table:table-cell office:value-type="string" calcext:value-type="string">
            <text:p>3E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3"/>
          <table:table-cell office:value-type="string" calcext:value-type="string">
            <text:p>3F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3"/>
          <table:table-cell office:value-type="string" calcext:value-type="string">
            <text:p>3F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3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3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3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3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3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3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3"/>
          <table:table-cell office:value-type="string" calcext:value-type="string">
            <text:p>41F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3"/>
          <table:table-cell office:value-type="string" calcext:value-type="string">
            <text:p>431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3"/>
          <table:table-cell office:value-type="string" calcext:value-type="string">
            <text:p>43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3"/>
          <table:table-cell office:value-type="string" calcext:value-type="string">
            <text:p>44D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3"/>
          <table:table-cell office:value-type="string" calcext:value-type="string">
            <text:p>45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3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3"/>
          <table:table-cell office:value-type="string" calcext:value-type="string">
            <text:p>45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3"/>
          <table:table-cell office:value-type="string" calcext:value-type="string">
            <text:p>45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3"/>
          <table:table-cell office:value-type="string" calcext:value-type="string">
            <text:p>456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3"/>
          <table:table-cell office:value-type="string" calcext:value-type="string">
            <text:p>45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3"/>
          <table:table-cell office:value-type="string" calcext:value-type="string">
            <text:p>458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3"/>
          <table:table-cell office:value-type="string" calcext:value-type="string">
            <text:p>458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3"/>
          <table:table-cell office:value-type="string" calcext:value-type="string">
            <text:p>45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3"/>
          <table:table-cell office:value-type="string" calcext:value-type="string">
            <text:p>45A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3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3"/>
          <table:table-cell office:value-type="string" calcext:value-type="string">
            <text:p>45B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3"/>
          <table:table-cell office:value-type="string" calcext:value-type="string">
            <text:p>45B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3"/>
          <table:table-cell office:value-type="string" calcext:value-type="string">
            <text:p>45D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3"/>
          <table:table-cell office:value-type="string" calcext:value-type="string">
            <text:p>45D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2"/>
          <table:table-cell office:value-type="float" office:value="4639" calcext:value-type="float">
            <text:p>4639</text:p>
          </table:table-cell>
          <table:table-cell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3"/>
          <table:table-cell office:value-type="string" calcext:value-type="string">
            <text:p>46B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3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4"/>
          <table:table-cell office:value-type="string" calcext:value-type="string">
            <text:p>VARP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4"/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4"/>
          <table:table-cell office:value-type="string" calcext:value-type="string">
            <text:p>RST_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4"/>
          <table:table-cell office:value-type="string" calcext:value-type="string">
            <text:p>PRTT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4"/>
          <table:table-cell office:value-type="string" calcext:value-type="string">
            <text:p>INITL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4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4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4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2"/>
          <table:table-cell office:value-type="string" calcext:value-type="string">
            <text:p>4C1E</text:p>
          </table:table-cell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3"/>
          <table:table-cell office:value-type="string" calcext:value-type="string">
            <text:p>4BD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3"/>
          <table:table-cell office:value-type="string" calcext:value-type="string">
            <text:p>4C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3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3"/>
          <table:table-cell office:value-type="string" calcext:value-type="string">
            <text:p>4CC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3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3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3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3"/>
          <table:table-cell office:value-type="string" calcext:value-type="string">
            <text:p>4D5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3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3"/>
          <table:table-cell office:value-type="string" calcext:value-type="string">
            <text:p>4DD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3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3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4FD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3"/>
          <table:table-cell office:value-type="string" calcext:value-type="string">
            <text:p>4FE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3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3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3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3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3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3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2"/>
          <table:table-cell office:value-type="string" calcext:value-type="string">
            <text:p>57A2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3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3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3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3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3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3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3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3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string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3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r f-key tb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7E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get file a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3"/>
          <table:table-cell office:value-type="string" calcext:value-type="string">
            <text:p>57EF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file ads + 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3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3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3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3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3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3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3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3"/>
          <table:table-cell office:value-type="string" calcext:value-type="string">
            <text:p>60D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4"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GETEOF</text:p>
          </table:table-cell>
          <table:table-cell office:value-type="string" calcext:value-type="string">
            <text:p>search for EOF (0x1A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2"/>
          <table:table-cell office:value-type="string" calcext:value-type="string">
            <text:p>6B72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2"/>
          <table:table-cell office:value-type="string" calcext:value-type="string">
            <text:p>6BA4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4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3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3"/>
          <table:table-cell office:value-type="string" calcext:value-type="string">
            <text:p>6A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3"/>
          <table:table-cell office:value-type="string" calcext:value-type="string">
            <text:p>6A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3"/>
          <table:table-cell office:value-type="string" calcext:value-type="string">
            <text:p>6A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3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3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3"/>
          <table:table-cell office:value-type="string" calcext:value-type="string">
            <text:p>6A6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3"/>
          <table:table-cell office:value-type="string" calcext:value-type="string">
            <text:p>6A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3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3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3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2"/>
          <table:table-cell office:value-type="string" calcext:value-type="string">
            <text:p>6D85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3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3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3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3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2"/>
          <table:table-cell office:value-type="string" calcext:value-type="string">
            <text:p>6E39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nd w x-on-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B42</text:p>
          </table:table-cell>
          <table:table-cell/>
          <table:table-cell office:value-type="string" calcext:value-type="string">
            <text:p>send character in C to serial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3"/>
          <table:table-cell office:value-type="string" calcext:value-type="string">
            <text:p>6B6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3"/>
          <table:table-cell office:value-type="string" calcext:value-type="string">
            <text:p>6B6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3"/>
          <table:table-cell office:value-type="string" calcext:value-type="string">
            <text:p>6B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3"/>
          <table:table-cell office:value-type="string" calcext:value-type="string">
            <text:p>6B9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3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3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3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3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3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3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3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3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3"/>
          <table:table-cell office:value-type="string" calcext:value-type="string">
            <text:p>6B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3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3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3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3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2"/>
          <table:table-cell office:value-type="string" calcext:value-type="string">
            <text:p>6F63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3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3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3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3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3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 and sync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3"/>
          <table:table-cell office:value-type="string" calcext:value-type="string">
            <text:p>6C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3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3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3"/>
          <table:table-cell office:value-type="string" calcext:value-type="string">
            <text:p>703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3"/>
          <table:table-cell office:value-type="string" calcext:value-type="string">
            <text:p>70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3"/>
          <table:table-cell office:value-type="string" calcext:value-type="string">
            <text:p>70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0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3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3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3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2"/>
          <table:table-cell office:value-type="string" calcext:value-type="string">
            <text:p>769F</text:p>
          </table:table-cell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3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3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3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3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3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3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3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3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3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3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4"/>
          <table:table-cell office:value-type="string" calcext:value-type="string">
            <text:p>GLYPH_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4"/>
          <table:table-cell office:value-type="string" calcext:value-type="string">
            <text:p>GLYPH_7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3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3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4"/>
          <table:table-cell office:value-type="string" calcext:value-type="string">
            <text:p>GLYPH_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4"/>
          <table:table-cell office:value-type="string" calcext:value-type="string">
            <text:p>GLYPH_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4"/>
          <table:table-cell office:value-type="string" calcext:value-type="string">
            <text:p>GLYPH_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3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4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3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3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3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3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3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3"/>
          <table:table-cell office:value-type="string" calcext:value-type="string">
            <text:p>F3A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2"/>
          <table:table-cell table:number-columns-repeated="2"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3"/>
          <table:table-cell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3"/>
          <table:table-cell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3"/>
          <table:table-cell office:value-type="string" calcext:value-type="string">
            <text:p>F6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2"/>
          <table:table-cell office:value-type="string" calcext:value-type="string">
            <text:p>F655</text:p>
          </table:table-cell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tra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3"/>
          <table:table-cell office:value-type="string" calcext:value-type="string">
            <text:p>F662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mm sta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3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3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3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3"/>
          <table:table-cell office:value-type="string" calcext:value-type="string">
            <text:p>F68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2"/>
          <table:table-cell office:value-type="string" calcext:value-type="string">
            <text:p>F688</text:p>
          </table:table-cell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Bfr for kb 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3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3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3"/>
          <table:table-cell office:value-type="string" calcext:value-type="string">
            <text:p>FB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3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3"/>
          <table:table-cell office:value-type="string" calcext:value-type="string">
            <text:p>FB7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3"/>
          <table:table-cell office:value-type="string" calcext:value-type="string">
            <text:p>FB7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3"/>
          <table:table-cell office:value-type="string" calcext:value-type="string">
            <text:p>FB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3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3"/>
          <table:table-cell office:value-type="string" calcext:value-type="string">
            <text:p>FBA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2"/>
          <table:table-cell office:value-type="string" calcext:value-type="string">
            <text:p>FBB4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STDO</text:p>
          </table:table-cell>
          <table:table-cell office:value-type="string" calcext:value-type="string">
            <text:p>strt D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2"/>
          <table:table-cell office:value-type="string" calcext:value-type="string">
            <text:p>FBB6</text:p>
          </table:table-cell>
          <table:table-cell office:value-type="string" calcext:value-type="string">
            <text:p>FBC2</text:p>
          </table:table-cell>
          <table:table-cell office:value-type="string" calcext:value-type="string">
            <text:p>STCO</text:p>
          </table:table-cell>
          <table:table-cell office:value-type="string" calcext:value-type="string">
            <text:p>strt C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3"/>
          <table:table-cell office:value-type="string" calcext:value-type="string">
            <text:p>FBC4</text:p>
          </table:table-cell>
          <table:table-cell office:value-type="string" calcext:value-type="string">
            <text:p>TOPFIL</text:p>
          </table:table-cell>
          <table:table-cell office:value-type="string" calcext:value-type="string">
            <text:p>end of top fil / DVI start of variable dat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3"/>
          <table:table-cell office:value-type="string" calcext:value-type="string">
            <text:p>FB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rt arr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3"/>
          <table:table-cell office:value-type="string" calcext:value-type="string">
            <text:p>FBC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1st unusd byte - unused memory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3"/>
          <table:table-cell office:value-type="string" calcext:value-type="string">
            <text:p>FBE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3"/>
          <table:table-cell office:value-type="string" calcext:value-type="string">
            <text:p>FBF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3"/>
          <table:table-cell office:value-type="string" calcext:value-type="string">
            <text:p>FBF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3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3"/>
          <table:table-cell office:value-type="string" calcext:value-type="string">
            <text:p>FCA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2"/>
          <table:table-cell office:value-type="string" calcext:value-type="string">
            <text:p>FC9F</text:p>
          </table:table-cell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3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3"/>
          <table:table-cell office:value-type="string" calcext:value-type="string">
            <text:p>FCA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2"/>
          <table:table-cell table:number-columns-repeated="2"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E00</text:p>
          </table:table-cell>
          <table:table-cell table:number-columns-repeated="4"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3"/>
          <table:table-cell office:value-type="string" calcext:value-type="string">
            <text:p>FCE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3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3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3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3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3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3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3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2"/>
          <table:table-cell office:value-type="string" calcext:value-type="string">
            <text:p>FF46</text:p>
          </table:table-cell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3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3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3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3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3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3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5"/>
          <table:table-cell office:value-type="string" calcext:value-type="string">
            <text:p>8 bits for storing function key recogni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3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2"/>
          <table:table-cell office:value-type="string" calcext:value-type="string">
            <text:p>FF6D</text:p>
          </table:table-cell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3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3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3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6"/>
        </table:table-row>
        <table:table-row table:style-name="ro2" table:number-rows-repeated="1048135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  <table:database-ranges>
        <table:database-range table:name="__Anonymous_Sheet_DB__0" table:target-range-address="rom_map_100_k85.A1:rom_map_100_k85.G440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33:06.872300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9T16:32:57.146169121</dc:date>
    <meta:editing-duration>PT10H39M12S</meta:editing-duration>
    <meta:editing-cycles>5</meta:editing-cycles>
    <meta:generator>LibreOffice/24.2.7.2$Linux_X86_64 LibreOffice_project/420$Build-2</meta:generator>
    <meta:document-statistic meta:table-count="1" meta:cell-count="1320" meta:object-count="0"/>
  </office:meta>
</office:document-meta>
</file>