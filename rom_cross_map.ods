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5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5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5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5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5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5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5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5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5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5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5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1F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5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5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 table:number-columns-repeated="5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5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5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5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 table:number-columns-repeated="3"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 table:number-columns-repeated="3"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5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 table:number-columns-repeated="3"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3"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 table:number-columns-repeated="5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/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5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 table:number-columns-repeated="3"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3"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RST 4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3"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5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5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 table:number-columns-repeated="5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 table:number-columns-repeated="5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 table:number-columns-repeated="3"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 table:number-columns-repeated="3"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 table:number-columns-repeated="3"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5"/>
          <table:table-cell office:value-type="string" calcext:value-type="string">
            <text:p>7FD6</text:p>
          </table:table-cell>
          <table:table-cell/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 table:number-columns-repeated="2"/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 table:number-columns-repeated="2"/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/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 table:number-columns-repeated="2"/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Number of active display lines <text:s text:c="9"/>(verify if M10 are typo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 table:number-columns-repeated="3"/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Number of active display columns <text:s text:c="2"/>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 table:number-columns-repeated="3"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3"/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 table:number-columns-repeated="5"/>
          <table:table-cell office:value-type="string" calcext:value-type="string">
            <text:p>F6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3"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 table:number-columns-repeated="3"/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LF, Non-Zero = 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 table:number-columns-repeated="3"/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3"/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PR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3"/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FLG</text:p>
          </table:table-cell>
          <table:table-cell office:value-type="string" calcext:value-type="string">
            <text:p>LCD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 table:number-columns-repeated="5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C</text:p>
          </table:table-cell>
          <table:table-cell table:number-columns-repeated="5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 table:number-columns-repeated="3"/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3"/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F95E</text:p>
          </table:table-cell>
          <table:table-cell/>
          <table:table-cell office:value-type="string" calcext:value-type="string">
            <text:p>used in RESETFPS</text:p>
          </table:table-cell>
        </table:table-row>
        <table:table-row table:style-name="ro2">
          <table:table-cell office:value-type="string" calcext:value-type="string">
            <text:p>F962</text:p>
          </table:table-cell>
          <table:table-cell table:number-columns-repeated="3"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 table:number-columns-repeated="5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 table:number-columns-repeated="5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 table:number-columns-repeated="5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5"/>
          <table:table-cell office:value-type="string" calcext:value-type="string">
            <text:p>FAC9</text:p>
          </table:table-cell>
          <table:table-cell/>
          <table:table-cell office:value-type="string" calcext:value-type="string">
            <text:p>Offset of last RST 7 call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FAD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8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 table:number-columns-repeated="5"/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Start of RST 7 vector table</text:p>
          </table:table-cell>
        </table:table-row>
        <table:table-row table:style-name="ro2">
          <table:table-cell office:value-type="string" calcext:value-type="string">
            <text:p>FB35</text:p>
          </table:table-cell>
          <table:table-cell table:number-columns-repeated="5"/>
          <table:table-cell office:value-type="string" calcext:value-type="string">
            <text:p>FB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5"/>
          <table:table-cell office:value-type="string" calcext:value-type="string">
            <text:p>FB7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AE</text:p>
          </table:table-cell>
          <table:table-cell table:number-columns-repeated="3"/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 table:number-columns-repeated="3"/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 table:number-columns-repeated="3"/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 table:number-columns-repeated="3"/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 table:number-columns-repeated="3"/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5"/>
          <table:table-cell office:value-type="string" calcext:value-type="string">
            <text:p>FC9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 table:number-columns-repeated="3"/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8 (9?) bytes padded fname / current BA pgm / prog name if not run from menu nor typed on select line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 table:number-columns-repeated="2"/>
          <table:table-cell office:value-type="string" calcext:value-type="string">
            <text:p>FILNM1</text:p>
          </table:table-cell>
          <table:table-cell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3"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5"/>
          <table:table-cell office:value-type="string" calcext:value-type="string">
            <text:p>FCAE</text:p>
          </table:table-cell>
          <table:table-cell office:value-type="string" calcext:value-type="string">
            <text:p>CFNAME</text:p>
          </table:table-cell>
          <table:table-cell office:value-type="string" calcext:value-type="string">
            <text:p>filename of last program loaded from tape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5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5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9</text:p>
          </table:table-cell>
          <table:table-cell table:number-columns-repeated="5"/>
          <table:table-cell office:value-type="string" calcext:value-type="string">
            <text:p>FC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 table:number-columns-repeated="5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 table:number-columns-repeated="3"/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 table:number-columns-repeated="3"/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0x0140 bytes</text:p>
          </table:table-cell>
        </table:table-row>
        <table:table-row table:style-name="ro2">
          <table:table-cell office:value-type="string" calcext:value-type="string">
            <text:p>FCE8</text:p>
          </table:table-cell>
          <table:table-cell table:number-columns-repeated="5"/>
          <table:table-cell office:value-type="string" calcext:value-type="string">
            <text:p>FCE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DA1</text:p>
          </table:table-cell>
          <table:table-cell table:number-columns-repeated="5"/>
          <table:table-cell office:value-type="string" calcext:value-type="string">
            <text:p>FDA1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BEGALT + 0x00E1</text:p>
          </table:table-cell>
        </table:table-row>
        <table:table-row table:style-name="ro2">
          <table:table-cell office:value-type="string" calcext:value-type="string">
            <text:p>FDD7</text:p>
          </table:table-cell>
          <table:table-cell table:number-columns-repeated="5"/>
          <table:table-cell office:value-type="string" calcext:value-type="string">
            <text:p>FD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BEGALT + 0x0117</text:p>
          </table:table-cell>
        </table:table-row>
        <table:table-row table:style-name="ro2">
          <table:table-cell office:value-type="string" calcext:value-type="string">
            <text:p>FDEE</text:p>
          </table:table-cell>
          <table:table-cell table:number-columns-repeated="5"/>
          <table:table-cell office:value-type="string" calcext:value-type="string">
            <text:p>FDE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EGALT + 0x012E</text:p>
          </table:table-cell>
        </table:table-row>
        <table:table-row table:style-name="ro2">
          <table:table-cell office:value-type="string" calcext:value-type="string">
            <text:p>FDEF</text:p>
          </table:table-cell>
          <table:table-cell table:number-columns-repeated="5"/>
          <table:table-cell office:value-type="string" calcext:value-type="string">
            <text:p>FDEF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BEGALT + 0x012F highest MENU directory location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 table:number-columns-repeated="5"/>
          <table:table-cell office:value-type="string" calcext:value-type="string">
            <text:p>FF40</text:p>
          </table:table-cell>
          <table:table-cell office:value-type="string" calcext:value-type="string">
            <text:p>XONOFF_CONTROL_0</text:p>
          </table:table-cell>
          <table:table-cell/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5"/>
          <table:table-cell office:value-type="string" calcext:value-type="string">
            <text:p>FF41</text:p>
          </table:table-cell>
          <table:table-cell office:value-type="string" calcext:value-type="string">
            <text:p>XONOFF_CONTROL_1</text:p>
          </table:table-cell>
          <table:table-cell/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/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3"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3"/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 (k85 addr seems sus, but "load COMBUF" above is clear)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5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5"/>
          <table:table-cell office:value-type="string" calcext:value-type="string">
            <text:p>FF48</text:p>
          </table:table-cell>
          <table:table-cell office:value-type="string" calcext:value-type="string">
            <text:p>COMOUTPTR</text:p>
          </table:table-cell>
          <table:table-cell/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5"/>
          <table:table-cell office:value-type="string" calcext:value-type="string">
            <text:p>FF49</text:p>
          </table:table-cell>
          <table:table-cell office:value-type="string" calcext:value-type="string">
            <text:p>COMINPTR</text:p>
          </table:table-cell>
          <table:table-cell office:value-type="string" calcext:value-type="string">
            <text:p>RS232 buffer input pointe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5"/>
          <table:table-cell office:value-type="string" calcext:value-type="string">
            <text:p>FF4B</text:p>
          </table:table-cell>
          <table:table-cell/>
          <table:table-cell office:value-type="string" calcext:value-type="string">
            <text:p>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5"/>
          <table:table-cell office:value-type="string" calcext:value-type="string">
            <text:p>FF4C</text:p>
          </table:table-cell>
          <table:table-cell/>
          <table:table-cell office:value-type="string" calcext:value-type="string">
            <text:p>UART baud rate timer value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5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 table:number-columns-repeated="5"/>
          <table:table-cell office:value-type="string" calcext:value-type="string">
            <text:p>FF63</text:p>
          </table:table-cell>
          <table:table-cell/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A</text:p>
          </table:table-cell>
          <table:table-cell table:number-columns-repeated="3"/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 table:number-columns-repeated="3"/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BUFFX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3"/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5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3"/>
          <table:table-cell office:value-type="string" calcext:value-type="string">
            <text:p>FF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805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52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03:28:12.532918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0T03:47:10.909060641</dc:date>
    <meta:editing-duration>PT11H24M10S</meta:editing-duration>
    <meta:editing-cycles>11</meta:editing-cycles>
    <meta:generator>LibreOffice/24.2.7.2$Linux_X86_64 LibreOffice_project/420$Build-2</meta:generator>
    <meta:document-statistic meta:table-count="1" meta:cell-count="1770" meta:object-count="0"/>
  </office:meta>
</office:document-meta>
</file>