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5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2" style:family="table-cell" style:parent-style-name="Default">
      <style:table-cell-properties fo:background-color="#b4c7dc" fo:border="0.74pt solid #000000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5" table:default-cell-style-name="Default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5" office:value-type="string" calcext:value-type="string">
            <text:p>M10na</text:p>
          </table:table-cell>
          <table:table-cell table:style-name="ce5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  <table:table-cell table:style-name="ce12" table:number-columns-repeated="16375"/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5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5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5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5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5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5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5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5"/>
          <table:table-cell office:value-type="string" calcext:value-type="string">
            <text:p>159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5"/>
          <table:table-cell office:value-type="string" calcext:value-type="string">
            <text:p>15B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5"/>
          <table:table-cell office:value-type="string" calcext:value-type="string">
            <text:p>15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5"/>
          <table:table-cell office:value-type="string" calcext:value-type="string">
            <text:p>162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F0</text:p>
          </table:table-cell>
          <table:table-cell/>
          <table:table-cell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5"/>
          <table:table-cell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1F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5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5"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5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17</text:p>
          </table:table-cell>
          <table:table-cell table:number-columns-repeated="5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AF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5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5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5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46</text:p>
          </table:table-cell>
          <table:table-cell table:number-columns-repeated="3"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39</text:p>
          </table:table-cell>
          <table:table-cell table:number-columns-repeated="3"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5"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5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69</text:p>
          </table:table-cell>
          <table:table-cell table:number-columns-repeated="3"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5"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5"/>
          <table:table-cell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29</text:p>
          </table:table-cell>
          <table:table-cell table:number-columns-repeated="5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5"/>
          <table:table-cell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5"/>
          <table:table-cell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5"/>
          <table:table-cell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5"/>
          <table:table-cell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5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5"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644</text:p>
          </table:table-cell>
          <table:table-cell table:number-columns-repeated="3"/>
          <table:table-cell office:value-type="float" office:value="4639" calcext:value-type="float">
            <text:p>4639</text:p>
          </table:table-cell>
          <table:table-cell/>
          <table:table-cell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6"/>
          <table:table-cell office:value-type="string" calcext:value-type="string">
            <text:p>RST_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6"/>
          <table:table-cell office:value-type="string" calcext:value-type="string">
            <text:p>PRTTAB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5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5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7A2</text:p>
          </table:table-cell>
          <table:table-cell/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5"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string to lc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6D</text:p>
          </table:table-cell>
          <table:table-cell table:number-columns-repeated="5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5"/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r f-key tb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5"/>
          <table:table-cell office:value-type="string" calcext:value-type="string">
            <text:p>57E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get file ad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file ads + 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5"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6"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2D</text:p>
          </table:table-cell>
          <table:table-cell table:number-columns-repeated="5"/>
          <table:table-cell office:value-type="string" calcext:value-type="string">
            <text:p>6835</text:p>
          </table:table-cell>
          <table:table-cell office:value-type="string" calcext:value-type="string">
            <text:p>GETEOF</text:p>
          </table:table-cell>
          <table:table-cell office:value-type="string" calcext:value-type="string">
            <text:p>search for EOF (0x1A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6D</text:p>
          </table:table-cell>
          <table:table-cell table:number-columns-repeated="3"/>
          <table:table-cell office:value-type="string" calcext:value-type="string">
            <text:p>6B72</text:p>
          </table:table-cell>
          <table:table-cell/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5"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6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5"/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5"/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5"/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/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/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nd w x-on-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5"/>
          <table:table-cell office:value-type="string" calcext:value-type="string">
            <text:p>6B42</text:p>
          </table:table-cell>
          <table:table-cell/>
          <table:table-cell office:value-type="string" calcext:value-type="string">
            <text:p>send character in C to serial por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5"/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5"/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/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5"/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 and sync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42</text:p>
          </table:table-cell>
          <table:table-cell table:number-columns-repeated="5"/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5"/>
          <table:table-cell office:value-type="string" calcext:value-type="string">
            <text:p>70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5"/>
          <table:table-cell office:value-type="string" calcext:value-type="string">
            <text:p>7FD6</text:p>
          </table:table-cell>
          <table:table-cell/>
          <table:table-cell office:value-type="string" calcext:value-type="string">
            <text:p>RST 7 (0x0038) RAM vector driver rout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5F0</text:p>
          </table:table-cell>
          <table:table-cell table:number-columns-repeated="3"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639</text:p>
          </table:table-cell>
          <table:table-cell table:number-columns-repeated="5"/>
          <table:table-cell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3A</text:p>
          </table:table-cell>
          <table:table-cell table:number-columns-repeated="5"/>
          <table:table-cell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0</text:p>
          </table:table-cell>
          <table:table-cell table:number-columns-repeated="5"/>
          <table:table-cell office:value-type="string" calcext:value-type="string">
            <text:p>F6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3"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trap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5B</text:p>
          </table:table-cell>
          <table:table-cell table:number-columns-repeated="5"/>
          <table:table-cell office:value-type="string" calcext:value-type="string">
            <text:p>F662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mm sta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A</text:p>
          </table:table-cell>
          <table:table-cell table:number-columns-repeated="5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7C</text:p>
          </table:table-cell>
          <table:table-cell table:number-columns-repeated="5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685</text:p>
          </table:table-cell>
          <table:table-cell table:number-columns-repeated="3"/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Bfr for kb li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calcext:value-type="string">
            <text:p>F95E</text:p>
          </table:table-cell>
          <table:table-cell/>
          <table:table-cell office:value-type="string" calcext:value-type="string">
            <text:p>used in RESETFP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9A</text:p>
          </table:table-cell>
          <table:table-cell table:number-columns-repeated="5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9AF</text:p>
          </table:table-cell>
          <table:table-cell table:number-columns-repeated="5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AD</text:p>
          </table:table-cell>
          <table:table-cell table:number-columns-repeated="5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5"/>
          <table:table-cell office:value-type="string" calcext:value-type="string">
            <text:p>FAC9</text:p>
          </table:table-cell>
          <table:table-cell/>
          <table:table-cell office:value-type="string" calcext:value-type="string">
            <text:p>Offset of last RST 7 cal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FAD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D8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DA</text:p>
          </table:table-cell>
          <table:table-cell table:number-columns-repeated="5"/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Start of RST 7 vector 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35</text:p>
          </table:table-cell>
          <table:table-cell table:number-columns-repeated="5"/>
          <table:table-cell office:value-type="string" calcext:value-type="string">
            <text:p>FB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5"/>
          <table:table-cell office:value-type="string" calcext:value-type="string">
            <text:p>FB7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AE</text:p>
          </table:table-cell>
          <table:table-cell table:number-columns-repeated="3"/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STDO</text:p>
          </table:table-cell>
          <table:table-cell office:value-type="string" calcext:value-type="string">
            <text:p>strt DO sto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0</text:p>
          </table:table-cell>
          <table:table-cell table:number-columns-repeated="3"/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STCO</text:p>
          </table:table-cell>
          <table:table-cell office:value-type="string" calcext:value-type="string">
            <text:p>strt CO sto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2</text:p>
          </table:table-cell>
          <table:table-cell table:number-columns-repeated="5"/>
          <table:table-cell office:value-type="string" calcext:value-type="string">
            <text:p>FBC4</text:p>
          </table:table-cell>
          <table:table-cell office:value-type="string" calcext:value-type="string">
            <text:p>TOPFIL</text:p>
          </table:table-cell>
          <table:table-cell office:value-type="string" calcext:value-type="string">
            <text:p>end of top fil / DVI start of variable data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4</text:p>
          </table:table-cell>
          <table:table-cell table:number-columns-repeated="5"/>
          <table:table-cell office:value-type="string" calcext:value-type="string">
            <text:p>FB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rt arr sto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B6</text:p>
          </table:table-cell>
          <table:table-cell table:number-columns-repeated="5"/>
          <table:table-cell office:value-type="string" calcext:value-type="string">
            <text:p>FBC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1st unusd byte - unused memory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5"/>
          <table:table-cell office:value-type="string" calcext:value-type="string">
            <text:p>FC9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93</text:p>
          </table:table-cell>
          <table:table-cell table:number-columns-repeated="5"/>
          <table:table-cell office:value-type="string" calcext:value-type="string">
            <text:p>FCA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8 (9?) bytes padded fname / current BA pgm / prog name if not run from menu nor typed on select lin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5"/>
          <table:table-cell office:value-type="string" calcext:value-type="string">
            <text:p>FCAE</text:p>
          </table:table-cell>
          <table:table-cell office:value-type="string" calcext:value-type="string">
            <text:p>CFNAME</text:p>
          </table:table-cell>
          <table:table-cell office:value-type="string" calcext:value-type="string">
            <text:p>filename of last program loaded from tap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5"/>
          <table:table-cell office:value-type="string" calcext:value-type="string">
            <text:p>FCB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5"/>
          <table:table-cell office:value-type="string" calcext:value-type="string">
            <text:p>FCA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5"/>
          <table:table-cell office:value-type="string" calcext:value-type="string">
            <text:p>FCA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CC0</text:p>
          </table:table-cell>
          <table:table-cell table:number-columns-repeated="3"/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E00</text:p>
          </table:table-cell>
          <table:table-cell table:number-columns-repeated="6"/>
          <table:table-cell office:value-type="string" calcext:value-type="string">
            <text:p>LCDMEM</text:p>
          </table:table-cell>
          <table:table-cell office:value-type="string" calcext:value-type="string">
            <text:p>start of LCD memory 0x0140 byt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CE8</text:p>
          </table:table-cell>
          <table:table-cell table:number-columns-repeated="5"/>
          <table:table-cell office:value-type="string" calcext:value-type="string">
            <text:p>FCE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DA1</text:p>
          </table:table-cell>
          <table:table-cell table:number-columns-repeated="5"/>
          <table:table-cell office:value-type="string" calcext:value-type="string">
            <text:p>FDA1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BEGALT + 0x00E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D7</text:p>
          </table:table-cell>
          <table:table-cell table:number-columns-repeated="5"/>
          <table:table-cell office:value-type="string" calcext:value-type="string">
            <text:p>FD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BEGALT + 0x011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EE</text:p>
          </table:table-cell>
          <table:table-cell table:number-columns-repeated="5"/>
          <table:table-cell office:value-type="string" calcext:value-type="string">
            <text:p>FDE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EGALT + 0x012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EF</text:p>
          </table:table-cell>
          <table:table-cell table:number-columns-repeated="5"/>
          <table:table-cell office:value-type="string" calcext:value-type="string">
            <text:p>FDEF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BEGALT + 0x012F highest MENU directory loca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5"/>
          <table:table-cell office:value-type="string" calcext:value-type="string">
            <text:p>FF40</text:p>
          </table:table-cell>
          <table:table-cell office:value-type="string" calcext:value-type="string">
            <text:p>XONOFF_CONTROL_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5"/>
          <table:table-cell office:value-type="string" calcext:value-type="string">
            <text:p>FF41</text:p>
          </table:table-cell>
          <table:table-cell office:value-type="string" calcext:value-type="string">
            <text:p>XONOFF_CONTROL_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5"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3"/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 (k85 addr seems sus, but "load COMBUF" above is clear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5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5"/>
          <table:table-cell office:value-type="string" calcext:value-type="string">
            <text:p>FF48</text:p>
          </table:table-cell>
          <table:table-cell office:value-type="string" calcext:value-type="string">
            <text:p>COMOUTPT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5"/>
          <table:table-cell office:value-type="string" calcext:value-type="string">
            <text:p>FF49</text:p>
          </table:table-cell>
          <table:table-cell office:value-type="string" calcext:value-type="string">
            <text:p>COMINPTR</text:p>
          </table:table-cell>
          <table:table-cell office:value-type="string" calcext:value-type="string">
            <text:p>RS232 buffer input poi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5"/>
          <table:table-cell office:value-type="string" calcext:value-type="string">
            <text:p>FF4B</text:p>
          </table:table-cell>
          <table:table-cell/>
          <table:table-cell office:value-type="string" calcext:value-type="string">
            <text:p>CTRL-S Statu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5"/>
          <table:table-cell office:value-type="string" calcext:value-type="string">
            <text:p>FF4C</text:p>
          </table:table-cell>
          <table:table-cell/>
          <table:table-cell office:value-type="string" calcext:value-type="string">
            <text:p>UART baud rate timer valu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5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2</text:p>
          </table:table-cell>
          <table:table-cell table:number-columns-repeated="5"/>
          <table:table-cell office:value-type="string" calcext:value-type="string">
            <text:p>FF63</text:p>
          </table:table-cell>
          <table:table-cell/>
          <table:table-cell office:value-type="string" calcext:value-type="string">
            <text:p>8 bits for storing shift, ctrl, grph, code, num, and caps lock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AA</text:p>
          </table:table-cell>
          <table:table-cell table:number-columns-repeated="3"/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  <table:table-cell table:number-columns-repeated="16375"/>
        </table:table-row>
        <table:table-row table:style-name="ro2" table:number-rows-repeated="104812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rom_map_100_k85.A1:rom_map_100_k85.I44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4:33:06.872300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09T18:01:57.352268511</dc:date>
    <meta:editing-duration>PT11H5M23S</meta:editing-duration>
    <meta:editing-cycles>6</meta:editing-cycles>
    <meta:generator>LibreOffice/24.2.7.2$Linux_X86_64 LibreOffice_project/420$Build-2</meta:generator>
    <meta:document-statistic meta:table-count="1" meta:cell-count="1357" meta:object-count="0"/>
  </office:meta>
</office:document-meta>
</file>